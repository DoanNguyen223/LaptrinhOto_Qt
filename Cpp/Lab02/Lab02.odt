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1D0000007FF694BCB650E546B7.png" manifest:media-type="image/png"/>
  <manifest:file-entry manifest:full-path="Pictures/10000000000001E30000022055D28EEA969B2165.png" manifest:media-type="image/png"/>
  <manifest:file-entry manifest:full-path="Pictures/100000000000041C000000C4BE3B34ED226C5073.png" manifest:media-type="image/png"/>
  <manifest:file-entry manifest:full-path="Pictures/100000000000041C0000006DCE92EAC137947093.png" manifest:media-type="image/png"/>
  <manifest:file-entry manifest:full-path="Pictures/10000000000001AE000002082109DEC50FD5CD1C.png" manifest:media-type="image/png"/>
  <manifest:file-entry manifest:full-path="Pictures/100000000000041C000000A33978B4EFB2743218.png" manifest:media-type="image/png"/>
  <manifest:file-entry manifest:full-path="Pictures/1000000000000226000001FF969F0BCF7D656EBA.png" manifest:media-type="image/png"/>
  <manifest:file-entry manifest:full-path="Pictures/100000000000041900000072789F53427EBD900A.png" manifest:media-type="image/png"/>
  <manifest:file-entry manifest:full-path="Pictures/10000000000001E10000018F631AD75C9D57346F.png" manifest:media-type="image/png"/>
  <manifest:file-entry manifest:full-path="Pictures/10000000000001F600000136DDCB790A8ACB053E.png" manifest:media-type="image/png"/>
  <manifest:file-entry manifest:full-path="Pictures/1000000000000429000000B7B079E2EAD5E60776.png" manifest:media-type="image/png"/>
  <manifest:file-entry manifest:full-path="Pictures/10000000000001FF000000EAEA2797365819C60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paragraph-rsid="00152cf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paragraph-rsid="00139d62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paragraph-rsid="00139d62"/>
    </style:style>
    <style:style style:name="P5" style:family="paragraph" style:parent-style-name="Standard">
      <style:paragraph-properties fo:text-align="start" style:justify-single-word="false"/>
      <style:text-properties fo:font-weight="normal" officeooo:paragraph-rsid="00139d62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paragraph-rsid="00139d62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HUYÊN ĐỀ 3 ES LAB 02</text:p>
      <text:p text:style-name="P2">Dương Hiển Đoàn Nguyên 22CE057</text:p>
      <text:p text:style-name="P2">Bài 3.3</text:p>
      <text:p text:style-name="P4"><text:span text:style-name="T1">Code:</text:span><text:span text:style-name="T2"><text:line-break/></text:span><draw:frame draw:style-name="fr2" draw:name="Image3" text:anchor-type="char" svg:x="0.6854in" svg:y="0.3854in" svg:width="5.3228in" svg:height="2.4374in" draw:z-index="2"><draw:image xlink:href="Pictures/10000000000001FF000000EAEA2797365819C600.png" xlink:type="simple" xlink:show="embed" xlink:actuate="onLoad" draw:mime-type="image/png"/></draw:frame><text:span text:style-name="T1"><text:line-break/>Kết quả:</text:span></text:p>
      <text:p text:style-name="P1"><draw:frame draw:style-name="fr2" draw:name="Image1" text:anchor-type="char" svg:x="0in" svg:y="0.0772in" svg:width="6.6929in" svg:height="1.15in" draw:z-index="0"><draw:image xlink:href="Pictures/1000000000000429000000B7B079E2EAD5E60776.png" xlink:type="simple" xlink:show="embed" xlink:actuate="onLoad" draw:mime-type="image/png"/></draw:frame><text:span text:style-name="T1">Explain:<text:line-break/>cout &lt;&lt; "int: " &lt;&lt; sizeof(int) &lt;&lt; " byte\n"; trả về kích thước (byte) của kiểu int<text:line-break/>Các dòng dưới tương tựu cho float, double,...</text:span><text:line-break/>Bài 3.4</text:p>
      <text:p text:style-name="P5">Code: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draw:frame draw:style-name="fr2" draw:name="Image2" text:anchor-type="char" svg:x="0.9925in" svg:y="0.2811in" svg:width="4.4744in" svg:height="2.9291in" draw:z-index="1"><draw:image xlink:href="Pictures/10000000000001E10000018F631AD75C9D57346F.png" xlink:type="simple" xlink:show="embed" xlink:actuate="onLoad" draw:mime-type="image/png"/></draw:frame>K<draw:frame draw:style-name="fr2" draw:name="Image4" text:anchor-type="char" svg:x="0.0937in" svg:y="3.7902in" svg:width="6.6929in" svg:height="0.7272in" draw:z-index="3"><draw:image xlink:href="Pictures/100000000000041900000072789F53427EBD900A.png" xlink:type="simple" xlink:show="embed" xlink:actuate="onLoad" draw:mime-type="image/png"/></draw:frame>ết quả:</text:p>
      <text:p text:style-name="P5"/>
      <text:p text:style-name="P5"><text:soft-page-break/>Explain:<text:line-break/>struct A { char c; int x; double d; }; định nghĩa kiểu A gồm 3 thành phần: char, int, double.</text:p>
      <text:p text:style-name="P5">struct B { int x; char c; double d; }; cùng thành phần nhưng với B thì đổi thứ tự</text:p>
      <text:p text:style-name="P5">sizeof(A) và sizeof(B) là in kích thước toàn bộ struct đã định nghĩa</text:p>
      <text:p text:style-name="P5"/>
      <text:p text:style-name="P3">Bài 3.5:</text:p>
      <text:p text:style-name="P5"><draw:frame draw:style-name="fr2" draw:name="Image5" text:anchor-type="char" svg:x="0.4819in" svg:y="0.3957in" svg:width="5.7291in" svg:height="5.3228in" draw:z-index="4"><draw:image xlink:href="Pictures/1000000000000226000001FF969F0BCF7D656EBA.png" xlink:type="simple" xlink:show="embed" xlink:actuate="onLoad" draw:mime-type="image/png"/></draw:frame>Code:</text:p>
      <text:p text:style-name="P5"/>
      <text:p text:style-name="P5">Kết quả:</text:p>
      <text:p text:style-name="P5"/>
      <text:p text:style-name="P5"><draw:frame draw:style-name="fr1" draw:name="Image6" text:anchor-type="char" svg:width="6.6929in" svg:height="1.0366in" draw:z-index="5"><draw:image xlink:href="Pictures/100000000000041C000000A33978B4EFB2743218.png" xlink:type="simple" xlink:show="embed" xlink:actuate="onLoad" draw:mime-type="image/png"/></draw:frame>Explain:<text:line-break/>struct MyStruct { int a; float b; char c; }; struct lưu mỗi thành phần trên vùng nhớ riêng</text:p>
      <text:p text:style-name="P5">union MyUnion { int a; float b; char c; }; union chia sẻ cùng một vùng nhớ cho tất cả thành phần</text:p>
      <text:p text:style-name="P5">Ở phần main thì sizeof(MyStruct) in kích thước struct và sizeof(MyUnion) thì in kích thước union</text:p>
      <text:p text:style-name="P5">tiếp theo <text:s/>gán u.a = 10 thì đọc u.a sẽ trả 10, gán u.b =3.14f sẽ ghi đè cùng vùng nhớ, do đó u.a sẽ chưá bit tương ứng 3.14 (float), gán u.c=X tiếp tục ghi đè, các thành phần khác sau này ghi đè sẽ cho giá trị khác</text:p>
      <text:p text:style-name="P5">=&gt; chia sẻ vùng nhớ, đổi một sẽ ảnh hương tất cả</text:p>
      <text:p text:style-name="P5"/>
      <text:p text:style-name="P3"><text:soft-page-break/>Bài 3.6</text:p>
      <text:p text:style-name="P5">Code:</text:p>
      <text:p text:style-name="P5"/>
      <text:p text:style-name="P5"><draw:frame draw:style-name="fr2" draw:name="Image7" text:anchor-type="char" svg:x="0.9819in" svg:y="0.0563in" svg:width="4.4791in" svg:height="4.5709in" draw:z-index="6"><draw:image xlink:href="Pictures/10000000000001AE000002082109DEC50FD5CD1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Kết quả:</text:p>
      <text:p text:style-name="P5"><draw:frame draw:style-name="fr1" draw:name="Image8" text:anchor-type="char" svg:width="6.6929in" svg:height="1.2465in" draw:z-index="7"><draw:image xlink:href="Pictures/100000000000041C000000C4BE3B34ED226C5073.png" xlink:type="simple" xlink:show="embed" xlink:actuate="onLoad" draw:mime-type="image/png"/></draw:frame>Explain:</text:p>
      <text:p text:style-name="P5">int g = 100; biến toàn cục, tồn tại cả chương trình</text:p>
      <text:p text:style-name="P5">void testStatic() { static int s = 0; ....... &lt;&lt; endl; static trong hàm chỉ tạo 1 lần duy nhất, nếu gọi getStactic() 2 lần thì sẽ in Statoc s=1 rồi s=2,…</text:p>
      <text:p text:style-name="P5">int x = 10; biến riêng trong main</text:p>
      <text:p text:style-name="P5">for (int i = 0; i &lt; 2; i++) { int y = i; ... endl; biến y chỉ tồn tại trong for, ngoài for không tồn tại được</text:p>
      <text:p text:style-name="P5">int *p = new int(50); cấp phát bộ nhớ t, giá trị được khởi tạo là 50( tự cho) . delete p; để giải phóng, nếu không sẽ bị leak.</text:p>
      <text:p text:style-name="P5">=&gt; luôn luôn delete sau khi new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oft-page-break/>Bài 3.7</text:p>
      <text:p text:style-name="P5">CodeL</text:p>
      <text:p text:style-name="P5"><draw:frame draw:style-name="fr2" draw:name="Image9" text:anchor-type="char" svg:x="0.9299in" svg:y="0.1811in" svg:width="5.2291in" svg:height="3.2291in" draw:z-index="8"><draw:image xlink:href="Pictures/10000000000001F600000136DDCB790A8ACB053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Kết quả:</text:p>
      <text:p text:style-name="P5"><draw:frame draw:style-name="fr1" draw:name="Image10" text:anchor-type="char" svg:width="6.6929in" svg:height="0.6929in" draw:z-index="9"><draw:image xlink:href="Pictures/100000000000041C0000006DCE92EAC137947093.png" xlink:type="simple" xlink:show="embed" xlink:actuate="onLoad" draw:mime-type="image/png"/></draw:frame>Explain:</text:p>
      <text:p text:style-name="P5">int sum(int a, int b) là hàm cộng cho int</text:p>
      <text:p text:style-name="P5">double sum(double a, double b) — hàm cùng tên sum nhưng khác kiểu tham số, đó chính là OVERLOADING</text:p>
      <text:p text:style-name="P5">sum(2, 3) → gọi bản int</text:p>
      <text:p text:style-name="P5">sum(2.5, 4.1) → gọi bản double</text:p>
      <text:p text:style-name="P5">=&gt; Không thể chỉ khác nhau về kiểu trả về để overload, kiểu tham số phải khác nhau. Overloading giúp code rõ ràng: dùng cùng tên hàm cho hành vi tương tự nhưng với kiểu dữ liệu khác</text:p>
      <text:p text:style-name="P3">Bài 3.8</text:p>
      <text:p text:style-name="P5">Code:</text:p>
      <text:p text:style-name="P5"/>
      <text:p text:style-name="P5"><draw:frame draw:style-name="fr2" draw:name="Image11" text:anchor-type="char" svg:x="1.9256in" svg:y="0.0264in" svg:width="3.3425in" svg:height="3.7646in" draw:z-index="10"><draw:image xlink:href="Pictures/10000000000001E30000022055D28EEA969B216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Kết quả:</text:p>
      <text:p text:style-name="P5"><draw:frame draw:style-name="fr1" draw:name="Image12" text:anchor-type="char" svg:width="6.6929in" svg:height="0.8071in" draw:z-index="11"><draw:image xlink:href="Pictures/100000000000041D0000007FF694BCB650E546B7.png" xlink:type="simple" xlink:show="embed" xlink:actuate="onLoad" draw:mime-type="image/png"/></draw:frame></text:p>
      <text:p text:style-name="P5">Explain:</text:p>
      <text:p text:style-name="P5">void byValue(int a) { a += 5; } <text:s/>khi gọi hàm, a là bản sao của biến vào, khi thay đổi a trong hàm không ảnh hưởng đến biến gốc.</text:p>
      <text:p text:style-name="P5">void byReference(int &amp;a) { a += 5; } hàm a là abí danh cho biến gốc, khi thay đổi a trong hàm thay đổi biến gốc</text:p>
      <text:p text:style-name="P5">oid byPointer(int *a) { *a += 5; }<text:line-break/>…<text:line-break/>s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6T17:12:07.734378030</meta:creation-date>
    <dc:date>2025-09-26T17:57:57.125910144</dc:date>
    <meta:editing-duration>PT24M55S</meta:editing-duration>
    <meta:editing-cycles>7</meta:editing-cycles>
    <meta:generator>LibreOffice/7.3.7.2$Linux_X86_64 LibreOffice_project/30$Build-2</meta:generator>
    <meta:document-statistic meta:table-count="0" meta:image-count="12" meta:object-count="0" meta:page-count="5" meta:paragraph-count="43" meta:word-count="507" meta:character-count="2311" meta:non-whitespace-character-count="1826"/>
  </office:meta>
</office:document-meta>
</file>